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6.101cm"/>
    </style:style>
    <style:style style:name="co2" style:family="table-column">
      <style:table-column-properties fo:break-before="auto" style:column-width="3.385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Style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CodeStyle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HeaderStyle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CellStyle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</style:style>
    <style:style style:name="ce7" style:family="table-cell" style:parent-style-name="CellStyle">
      <style:table-cell-properties fo:wrap-option="wrap" style:vertical-align="top"/>
    </style:style>
    <style:style style:name="ce8" style:family="table-cell" style:parent-style-name="CellStyle">
      <style:table-cell-properties style:text-align-source="value-type" style:repeat-content="false" fo:wrap-option="no-wrap" style:vertical-align="top"/>
      <style:paragraph-properties fo:margin-left="0cm"/>
    </style:style>
    <style:style style:name="ce9" style:family="table-cell" style:parent-style-name="Default">
      <style:table-cell-properties style:text-align-source="value-type" style:repeat-content="false" fo:wrap-option="no-wrap" style:vertical-align="top"/>
      <style:paragraph-properties fo:margin-left="0cm"/>
    </style:style>
  </office:automatic-styles>
  <office:body>
    <office:spreadsheet>
      <table:table table:name="Mappatur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9"/>
        <table:table-column table:style-name="co1" table:number-columns-repeated="2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>
            <text:p>Nome della Funzione</text:p>
          </table:table-cell>
          <table:table-cell table:style-name="ce4" office:value-type="string" calcext:value-type="string">
            <text:p>Modulo</text:p>
          </table:table-cell>
          <table:table-cell table:style-name="ce1" office:value-type="string" calcext:value-type="string">
            <text:p>Titolo Interfaccia</text:p>
          </table:table-cell>
          <table:table-cell table:style-name="ce1" office:value-type="string" calcext:value-type="string">
            <text:p>Sintesi Docstring dello Script</text:p>
          </table:table-cell>
          <table:table-cell table:style-name="ce4" office:value-type="string" calcext:value-type="string">
            <text:p>Nome Icona Associata</text:p>
          </table:table-cell>
          <table:table-cell table:style-name="ce4" office:value-type="string" calcext:value-type="string">
            <text:p>Proposta Nome Alternativo</text:p>
          </table:table-cell>
          <table:table-cell table:style-name="ce1" office:value-type="string" calcext:value-type="string">
            <text:p>Proposta Metafora dell'Icona</text:p>
          </table:table-cell>
          <table:table-cell table:style-name="ce1" office:value-type="string" calcext:value-type="string">
            <text:p>URL Azione / Dispatcher</text:p>
          </table:table-cell>
        </table:table-row>
        <table:table-row table:style-name="ro2">
          <table:table-cell table:style-name="ce2" office:value-type="string" calcext:value-type="string">
            <text:p>BASIC:InLettereFunc.In_Let()</text:p>
          </table:table-cell>
          <table:table-cell table:style-name="ce5" office:value-type="string" calcext:value-type="string">
            <text:p>BASIC:InLettereFunc</text:p>
          </table:table-cell>
          <table:table-cell table:style-name="ce7" office:value-type="string" calcext:value-type="string">
            <text:p>Numeri in lettere</text:p>
          </table:table-cell>
          <table:table-cell table:style-name="ce7" office:value-type="string" calcext:value-type="string">
            <text:p>Algoritmo per la conversione di un valore numerico in lettere, espresso in lingua italiana, ideale per atti legali e contabilità.</text:p>
          </table:table-cell>
          <table:table-cell table:style-name="ce8" office:value-type="string" calcext:value-type="string">
            <text:p>sf_Ver</text:p>
          </table:table-cell>
          <table:table-cell table:style-name="ce8" office:value-type="string" calcext:value-type="string">
            <text:p>numeri_lettere</text:p>
          </table:table-cell>
          <table:table-cell table:style-name="ce7" office:value-type="string" calcext:value-type="string">
            <text:p>Le lettere `123` con una freccia a fumetto che punta alla parola `abc`</text:p>
          </table:table-cell>
          <table:table-cell table:style-name="ce7" office:value-type="string" calcext:value-type="string">
            <text:p>vnd.sun.star.script:UltimusFree2.InLettereFunc.In_Let?language=Basic&amp;location=application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BASIC:PY_bridge.DlgMain()</text:p>
          </table:table-cell>
          <table:table-cell table:style-name="ce5" office:value-type="string" calcext:value-type="string">
            <text:p>BASIC:PY_bridge</text:p>
          </table:table-cell>
          <table:table-cell table:style-name="ce7" office:value-type="string" calcext:value-type="string">
            <text:p>Menù Principale</text:p>
          </table:table-cell>
          <table:table-cell table:style-name="ce7" office:value-type="string" calcext:value-type="string">
            <text:p>Mostra la console o pannello principale di controllo di LeenO da cui è possibile accedere a tutte le funzionalità dell'estensione.</text:p>
          </table:table-cell>
          <table:table-cell table:number-columns-repeated="2" table:style-name="ce8" office:value-type="string" calcext:value-type="string">
            <text:p>leeno</text:p>
          </table:table-cell>
          <table:table-cell table:style-name="ce7" office:value-type="string" calcext:value-type="string">
            <text:p>Marchio piatto e coeso. Lettere 'L' e 'O' intrecciate in stile outline vettoriale.</text:p>
          </table:table-cell>
          <table:table-cell table:style-name="ce7" office:value-type="string" calcext:value-type="string">
            <text:p>vnd.sun.star.script:UltimusFree2.PY_bridge.DlgMain?language=Basic&amp;location=application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Debug.aggiorna_configurazione_leeno()</text:p>
          </table:table-cell>
          <table:table-cell table:style-name="ce5" office:value-type="string" calcext:value-type="string">
            <text:p>Debug</text:p>
          </table:table-cell>
          <table:table-cell table:style-name="ce7" office:value-type="string" calcext:value-type="string">
            <text:p>Rigenera Addons.xcu e registrymodifications.xcu senza reinstallare (Win/Linux/Mac)</text:p>
          </table:table-cell>
          <table:table-cell table:style-name="ce7" office:value-type="string" calcext:value-type="string">
            <text:p>Rigenera Addons.xcu, Accelerators.xcu e registrymodifications.xcu senza reinstallare (Win/Linux/Mac)</text:p>
          </table:table-cell>
          <table:table-cell table:number-columns-repeated="2" table:style-name="ce8" office:value-type="string" calcext:value-type="string">
            <text:p>refresh</text:p>
          </table:table-cell>
          <table:table-cell table:style-name="ce7" office:value-type="string" calcext:value-type="string">
            <text:p>Due frecce circolari che formano un ciclo continuo</text:p>
          </table:table-cell>
          <table:table-cell table:style-name="ce7" office:value-type="string" calcext:value-type="string">
            <text:p>service:org.giuseppe-vizziello.leeno.dispatcher?Debug.aggiorna_configurazione_leeno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A2.MENU_importi()</text:p>
          </table:table-cell>
          <table:table-cell table:style-name="ce5" office:value-type="string" calcext:value-type="string">
            <text:p>LeenoA2</text:p>
          </table:table-cell>
          <table:table-cell table:style-name="ce7" office:value-type="string" calcext:value-type="string">
            <text:p>Importi Computo/Variante/Contabilità</text:p>
          </table:table-cell>
          <table:table-cell table:style-name="ce7" office:value-type="string" calcext:value-type="string">
            <text:p>Elabora e visualizza un quadro riassuntivo degli importi e dei costi complessivi suddivisi tra Computo, Variante e Contabilità.</text:p>
          </table:table-cell>
          <table:table-cell table:number-columns-repeated="2" table:style-name="ce8" office:value-type="string" calcext:value-type="string">
            <text:p>riepilogo_a2</text:p>
          </table:table-cell>
          <table:table-cell table:style-name="ce7" office:value-type="string" calcext:value-type="string">
            <text:p>Primitiva documento contenente una griglia di matrice dei costi</text:p>
          </table:table-cell>
          <table:table-cell table:style-name="ce7" office:value-type="string" calcext:value-type="string">
            <text:p>service:org.giuseppe-vizziello.leeno.dispatcher?LeenoA2.MENU_import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Analysis.Inserisci_Utili()</text:p>
          </table:table-cell>
          <table:table-cell table:style-name="ce5" office:value-type="string" calcext:value-type="string">
            <text:p>LeenoAnalysis</text:p>
          </table:table-cell>
          <table:table-cell table:style-name="ce7" office:value-type="string" calcext:value-type="string">
            <text:p>Inserisci % Utili/Maggiorazioni</text:p>
          </table:table-cell>
          <table:table-cell table:style-name="ce7" office:value-type="string" calcext:value-type="string">
            <text:p>Apre il dialogo per inserire e configurare le percentuali relative a spese generali e utili dell'impresa per l'Analisi dei Prezzi.</text:p>
          </table:table-cell>
          <table:table-cell table:style-name="ce8" office:value-type="string" calcext:value-type="string">
            <text:p>perc</text:p>
          </table:table-cell>
          <table:table-cell table:style-name="ce8" office:value-type="string" calcext:value-type="string">
            <text:p>utili_maggiorazioni</text:p>
          </table:table-cell>
          <table:table-cell table:style-name="ce7" office:value-type="string" calcext:value-type="string">
            <text:p>Segno di percentuale pulito `%` in Verde Primario con tratto da 2px</text:p>
          </table:table-cell>
          <table:table-cell table:style-name="ce7" office:value-type="string" calcext:value-type="string">
            <text:p>service:org.giuseppe-vizziello.leeno.dispatcher?LeenoAnalysis.Inserisci_Util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Analysis.Main_Riordina_Analisi_Alfabetico()</text:p>
          </table:table-cell>
          <table:table-cell table:style-name="ce5" office:value-type="string" calcext:value-type="string">
            <text:p>LeenoAnalysis</text:p>
          </table:table-cell>
          <table:table-cell table:style-name="ce7" office:value-type="string" calcext:value-type="string">
            <text:p>Riordina Voci (ordine alfabetico)</text:p>
          </table:table-cell>
          <table:table-cell table:style-name="ce7" office:value-type="string" calcext:value-type="string">
            <text:p>Avvia la procedura di riordino in ordine alfabetico di tutte le voci presenti nel foglio Analisi di Prezzo.</text:p>
          </table:table-cell>
          <table:table-cell table:number-columns-repeated="2" table:style-name="ce8" office:value-type="string" calcext:value-type="string">
            <text:p>riordina</text:p>
          </table:table-cell>
          <table:table-cell table:style-name="ce7" office:value-type="string" calcext:value-type="string">
            <text:p>Freccia verticale adiacente alle lettere 'A' e 'Z' impilate</text:p>
          </table:table-cell>
          <table:table-cell table:style-name="ce7" office:value-type="string" calcext:value-type="string">
            <text:p>service:org.giuseppe-vizziello.leeno.dispatcher?LeenoAnalysis.Main_Riordina_Analisi_Alfabetico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Computo.MENU_inserisci_somme_lavori_sicurezza()</text:p>
          </table:table-cell>
          <table:table-cell table:style-name="ce5" office:value-type="string" calcext:value-type="string">
            <text:p>LeenoComputo</text:p>
          </table:table-cell>
          <table:table-cell table:style-name="ce7" office:value-type="string" calcext:value-type="string">
            <text:p>Inserisci somme LAVORI e SICUREZZA</text:p>
          </table:table-cell>
          <table:table-cell table:style-name="ce7" office:value-type="string" calcext:value-type="string">
            <text:p>Inserisce le somme totali dei lavori e della sicurezza in una cella a scelta, in base al prefisso del codice_voce: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serisci_somme_lavori_sicurezza</text:p>
          </table:table-cell>
          <table:table-cell table:style-name="ce7" office:value-type="string" calcext:value-type="string">
            <text:p>Icona outline coordinata per la funzione inserisci somme lavori e sicurezza. Progettata su griglia 24x24 con spessore di 1.5px.</text:p>
          </table:table-cell>
          <table:table-cell table:style-name="ce7" office:value-type="string" calcext:value-type="string">
            <text:p>service:org.giuseppe-vizziello.leeno.dispatcher?LeenoComputo.MENU_inserisci_somme_lavori_sicurezza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LeenoConfig.MENU_leeno_conf()</text:p>
          </table:table-cell>
          <table:table-cell table:style-name="ce5" office:value-type="string" calcext:value-type="string">
            <text:p>LeenoConfig</text:p>
          </table:table-cell>
          <table:table-cell table:style-name="ce7" office:value-type="string" calcext:value-type="string">
            <text:p>Opzioni...</text:p>
          </table:table-cell>
          <table:table-cell table:style-name="ce7" office:value-type="string" calcext:value-type="string">
            <text:p>Visualizza il menù di configurazione</text:p>
          </table:table-cell>
          <table:table-cell table:number-columns-repeated="2" table:style-name="ce8" office:value-type="string" calcext:value-type="string">
            <text:p>config</text:p>
          </table:table-cell>
          <table:table-cell table:style-name="ce7" office:value-type="string" calcext:value-type="string">
            <text:p>Due ingranaggi annidati di dimensioni diverse con denti arrotondati</text:p>
          </table:table-cell>
          <table:table-cell table:style-name="ce7" office:value-type="string" calcext:value-type="string">
            <text:p>service:org.giuseppe-vizziello.leeno.dispatcher?LeenoConfig.MENU_leeno_conf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LeenoContab.MENU_partita_aggiungi()</text:p>
          </table:table-cell>
          <table:table-cell table:style-name="ce5" office:value-type="string" calcext:value-type="string">
            <text:p>LeenoContab</text:p>
          </table:table-cell>
          <table:table-cell table:style-name="ce7" office:value-type="string" calcext:value-type="string">
            <text:p>Inserisci Partita Provvisoria</text:p>
          </table:table-cell>
          <table:table-cell table:style-name="ce7" office:value-type="string" calcext:value-type="string">
            <text:p>Funzione per la gestione delle operazioni di partita aggiungi nell'interfaccia di LeenO.</text:p>
          </table:table-cell>
          <table:table-cell table:style-name="ce8" office:value-type="string" calcext:value-type="string">
            <text:p>part_agg</text:p>
          </table:table-cell>
          <table:table-cell table:style-name="ce8" office:value-type="string" calcext:value-type="string">
            <text:p>partita_provvisoria_piu</text:p>
          </table:table-cell>
          <table:table-cell table:style-name="ce7" office:value-type="string" calcext:value-type="string">
            <text:p>Pila di schede contabili con un badge Più Verde (`+`)</text:p>
          </table:table-cell>
          <table:table-cell table:style-name="ce7" office:value-type="string" calcext:value-type="string">
            <text:p>service:org.giuseppe-vizziello.leeno.dispatcher?LeenoContab.MENU_partita_aggiung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LeenoContab.MENU_partita_detrai()</text:p>
          </table:table-cell>
          <table:table-cell table:style-name="ce5" office:value-type="string" calcext:value-type="string">
            <text:p>LeenoContab</text:p>
          </table:table-cell>
          <table:table-cell table:style-name="ce7" office:value-type="string" calcext:value-type="string">
            <text:p>Detrai Partita Provisoria</text:p>
          </table:table-cell>
          <table:table-cell table:style-name="ce7" office:value-type="string" calcext:value-type="string">
            <text:p>Funzione per la gestione delle operazioni di partita detrai nell'interfaccia di LeenO.</text:p>
          </table:table-cell>
          <table:table-cell table:style-name="ce8" office:value-type="string" calcext:value-type="string">
            <text:p>part_det</text:p>
          </table:table-cell>
          <table:table-cell table:style-name="ce8" office:value-type="string" calcext:value-type="string">
            <text:p>partita_provvisoria_meno</text:p>
          </table:table-cell>
          <table:table-cell table:style-name="ce7" office:value-type="string" calcext:value-type="string">
            <text:p>Pila di schede contabili con un badge Meno Arancione (`-`)</text:p>
          </table:table-cell>
          <table:table-cell table:style-name="ce7" office:value-type="string" calcext:value-type="string">
            <text:p>service:org.giuseppe-vizziello.leeno.dispatcher?LeenoContab.MENU_partita_detra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Etransmit.e_transmit_calc()</text:p>
          </table:table-cell>
          <table:table-cell table:style-name="ce5" office:value-type="string" calcext:value-type="string">
            <text:p>LeenoEtransmit</text:p>
          </table:table-cell>
          <table:table-cell table:style-name="ce7" office:value-type="string" calcext:value-type="string">
            <text:p>e-Transmit di LeenO...</text:p>
          </table:table-cell>
          <table:table-cell table:style-name="ce7" office:value-type="string" calcext:value-type="string">
            <text:p>Funzione per la gestione delle operazioni di e transmit calc nell'interfaccia di LeenO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_transmit_calc</text:p>
          </table:table-cell>
          <table:table-cell table:style-name="ce7" office:value-type="string" calcext:value-type="string">
            <text:p>Icona outline coordinata per la funzione e-transmit di leeno.... Progettata su griglia 24x24 con spessore di 1.5px.</text:p>
          </table:table-cell>
          <table:table-cell table:style-name="ce7" office:value-type="string" calcext:value-type="string">
            <text:p>service:org.giuseppe-vizziello.leeno.dispatcher?LeenoEtransmit.e_transmit_calc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Extra.ricevuta_pec()</text:p>
          </table:table-cell>
          <table:table-cell table:style-name="ce5" office:value-type="string" calcext:value-type="string">
            <text:p>LeenoExtra</text:p>
          </table:table-cell>
          <table:table-cell table:style-name="ce7" office:value-type="string" calcext:value-type="string">
            <text:p>Importa daticert.xml PEC</text:p>
          </table:table-cell>
          <table:table-cell table:style-name="ce7" office:value-type="string" calcext:value-type="string">
            <text:p>Copia i dati dal file xml di accettazione / avvenuta-consegna PEC in un nuovo fogl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ricevuta_pec</text:p>
          </table:table-cell>
          <table:table-cell table:style-name="ce7" office:value-type="string" calcext:value-type="string">
            <text:p>Icona outline coordinata per la funzione importa daticert.xml pec. Progettata su griglia 24x24 con spessore di 1.5px.</text:p>
          </table:table-cell>
          <table:table-cell table:style-name="ce7" office:value-type="string" calcext:value-type="string">
            <text:p>service:org.giuseppe-vizziello.leeno.dispatcher?LeenoExtra.ricevuta_pec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Giornale.MENU_nuovo_giorno()</text:p>
          </table:table-cell>
          <table:table-cell table:style-name="ce5" office:value-type="string" calcext:value-type="string">
            <text:p>LeenoGiornale</text:p>
          </table:table-cell>
          <table:table-cell table:style-name="ce7" office:value-type="string" calcext:value-type="string">
            <text:p>Nuovo Giornale Lavori / nuovo giorno</text:p>
          </table:table-cell>
          <table:table-cell table:style-name="ce7" office:value-type="string" calcext:value-type="string">
            <text:p>Apre un nuovo giornale lavori o inserisce nuovo giorno</text:p>
          </table:table-cell>
          <table:table-cell table:style-name="ce8" office:value-type="string" calcext:value-type="string">
            <text:p>image15</text:p>
          </table:table-cell>
          <table:table-cell table:style-name="ce8" office:value-type="string" calcext:value-type="string">
            <text:p>nuovo_computo</text:p>
          </table:table-cell>
          <table:table-cell table:style-name="ce7" office:value-type="string" calcext:value-type="string">
            <text:p>Una primitiva di documento vuoto con un badge di aggiunta verde in basso a destra, indicando la creazione di un nuovo foglio computo.</text:p>
          </table:table-cell>
          <table:table-cell table:style-name="ce7" office:value-type="string" calcext:value-type="string">
            <text:p>service:org.giuseppe-vizziello.leeno.dispatcher?LeenoGiornale.MENU_nuovo_giorno</text:p>
          </table:table-cell>
          <table:table-cell table:style-name="ce3" table:number-columns-repeated="16376"/>
        </table:table-row>
        <table:table-row table:style-name="ro4">
          <table:table-cell table:style-name="ce2" office:value-type="string" calcext:value-type="string">
            <text:p>LeenoImport.MENU_FVG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Importa prezzario da XLSX Regione Friuli Venezia Giulia</text:p>
          </table:table-cell>
          <table:table-cell table:style-name="ce7" office:value-type="string" calcext:value-type="string">
            <text:p>Importa Prezzario Friuli Venezia Giulia secondo schema tabellare rilasciato a gennaio 20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fvg</text:p>
          </table:table-cell>
          <table:table-cell table:style-name="ce7" office:value-type="string" calcext:value-type="string">
            <text:p>Icona outline coordinata per la funzione importa prezzario da xlsx regione friuli venezia giulia. Progettata su griglia 24x24 con spessore di 1.5px.</text:p>
          </table:table-cell>
          <table:table-cell table:style-name="ce7" office:value-type="string" calcext:value-type="string">
            <text:p>service:org.giuseppe-vizziello.leeno.dispatcher?LeenoImport.MENU_FVG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.MENU_ImportElencoPrezziXML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Importa prezzario da formato XML</text:p>
          </table:table-cell>
          <table:table-cell table:style-name="ce7" office:value-type="string" calcext:value-type="string">
            <text:p>Avvia the parser per importare un prezzario in formato XML (standard Six o regionali) convertendolo in Elenco Prezzi.</text:p>
          </table:table-cell>
          <table:table-cell table:number-columns-repeated="2" table:style-name="ce8" office:value-type="string" calcext:value-type="string">
            <text:p>importa_xml</text:p>
          </table:table-cell>
          <table:table-cell table:style-name="ce7" office:value-type="string" calcext:value-type="string">
            <text:p>Primitiva documento con la scritta `XML` stampata sopra, abbinata a una freccia in entrata in basso a sinistra (`↓`).</text:p>
          </table:table-cell>
          <table:table-cell table:style-name="ce7" office:value-type="string" calcext:value-type="string">
            <text:p>service:org.giuseppe-vizziello.leeno.dispatcher?LeenoImport.MENU_ImportElencoPrezziXML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.MENU_PUGLIA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Importa prezzario da XLSX Regione Puglia</text:p>
          </table:table-cell>
          <table:table-cell table:style-name="ce7" office:value-type="string" calcext:value-type="string">
            <text:p>Importa Prezzario Puglia secondo schema tabellare rilasciato a Luglio 20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uglia</text:p>
          </table:table-cell>
          <table:table-cell table:style-name="ce7" office:value-type="string" calcext:value-type="string">
            <text:p>Icona outline coordinata per la funzione importa prezzario da xlsx regione puglia. Progettata su griglia 24x24 con spessore di 1.5px.</text:p>
          </table:table-cell>
          <table:table-cell table:style-name="ce7" office:value-type="string" calcext:value-type="string">
            <text:p>service:org.giuseppe-vizziello.leeno.dispatcher?LeenoImport.MENU_PUGLI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.MENU_Piemonte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Importa prezzario da set XLS Regione Piemonte</text:p>
          </table:table-cell>
          <table:table-cell table:style-name="ce7" office:value-type="string" calcext:value-type="string">
            <text:p>Parser dedicato per l'importazione automatica del prezzario regionale della Regione Piemonte da foglio XLS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iemonte</text:p>
          </table:table-cell>
          <table:table-cell table:style-name="ce7" office:value-type="string" calcext:value-type="string">
            <text:p>Icona outline coordinata per la funzione importa prezzario da set xls regione piemonte. Progettata su griglia 24x24 con spessore di 1.5px.</text:p>
          </table:table-cell>
          <table:table-cell table:style-name="ce7" office:value-type="string" calcext:value-type="string">
            <text:p>service:org.giuseppe-vizziello.leeno.dispatcher?LeenoImport.MENU_Piemont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.MENU_fuf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importa DAT per Luca</text:p>
          </table:table-cell>
          <table:table-cell table:style-name="ce7" office:value-type="string" calcext:value-type="string">
            <text:p>Traduce un particolare formato DAT usato in falegnameria - non c'entra un tubo con LeenO. E' solo una cortesia per un amico.</text:p>
          </table:table-cell>
          <table:table-cell table:style-name="ce8" office:value-type="string" calcext:value-type="string">
            <text:p>falegname</text:p>
          </table:table-cell>
          <table:table-cell table:style-name="ce8" office:value-type="string" calcext:value-type="string">
            <text:p>importa_dat</text:p>
          </table:table-cell>
          <table:table-cell table:style-name="ce7" office:value-type="string" calcext:value-type="string">
            <text:p>Una primitiva di parentesi di codice (`&lt;&gt;`) con una freccia di importazione</text:p>
          </table:table-cell>
          <table:table-cell table:style-name="ce7" office:value-type="string" calcext:value-type="string">
            <text:p>service:org.giuseppe-vizziello.leeno.dispatcher?LeenoImport.MENU_fuf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.MENU_importa_listino_leeno()</text:p>
          </table:table-cell>
          <table:table-cell table:style-name="ce5" office:value-type="string" calcext:value-type="string">
            <text:p>LeenoImport</text:p>
          </table:table-cell>
          <table:table-cell table:style-name="ce7" office:value-type="string" calcext:value-type="string">
            <text:p>Converti Listino in Elenco Prezzi (-leeno)</text:p>
          </table:table-cell>
          <table:table-cell table:style-name="ce7" office:value-type="string" calcext:value-type="string">
            <text:p>Converte un listino prezzi generico in formato Calc nel foglio Elenco Prezzi strutturato di LeenO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mporta_listino_leeno</text:p>
          </table:table-cell>
          <table:table-cell table:style-name="ce7" office:value-type="string" calcext:value-type="string">
            <text:p>Icona outline coordinata per la funzione converti listino in elenco prezzi (-leeno). Progettata su griglia 24x24 con spessore di 1.5px.</text:p>
          </table:table-cell>
          <table:table-cell table:style-name="ce7" office:value-type="string" calcext:value-type="string">
            <text:p>service:org.giuseppe-vizziello.leeno.dispatcher?LeenoImport.MENU_importa_listino_leeno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Import_XPWE.MENU_XPWE_import()</text:p>
          </table:table-cell>
          <table:table-cell table:style-name="ce5" office:value-type="string" calcext:value-type="string">
            <text:p>LeenoImport_XPWE</text:p>
          </table:table-cell>
          <table:table-cell table:style-name="ce7" office:value-type="string" calcext:value-type="string">
            <text:p>Importa/Accoda dati da archivio XPWE</text:p>
          </table:table-cell>
          <table:table-cell table:style-name="ce7" office:value-type="string" calcext:value-type="string">
            <text:p>Consente di importare un file in formato XPWE convertendolo direttamente in un foglio di calcolo LeenO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pwe_import</text:p>
          </table:table-cell>
          <table:table-cell table:style-name="ce7" office:value-type="string" calcext:value-type="string">
            <text:p>Icona outline coordinata per la funzione importa/accoda dati da archivio xpwe. Progettata su griglia 24x24 con spessore di 1.5px.</text:p>
          </table:table-cell>
          <table:table-cell table:style-name="ce7" office:value-type="string" calcext:value-type="string">
            <text:p>service:org.giuseppe-vizziello.leeno.dispatcher?LeenoImport_XPWE.MENU_XPWE_import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Pdf.MENU_Pdf()</text:p>
          </table:table-cell>
          <table:table-cell table:style-name="ce5" office:value-type="string" calcext:value-type="string">
            <text:p>LeenoPdf</text:p>
          </table:table-cell>
          <table:table-cell table:style-name="ce7" office:value-type="string" calcext:value-type="string">
            <text:p>Esporta documenti in PDF</text:p>
          </table:table-cell>
          <table:table-cell table:style-name="ce7" office:value-type="string" calcext:value-type="string">
            <text:p>Consente l'esportazione guidata e l'ottimizzazione del computo metrico in uno o più file PDF pronti per la stampa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df</text:p>
          </table:table-cell>
          <table:table-cell table:style-name="ce7" office:value-type="string" calcext:value-type="string">
            <text:p>Icona outline coordinata per la funzione esporta documenti in pdf. Progettata su griglia 24x24 con spessore di 1.5px.</text:p>
          </table:table-cell>
          <table:table-cell table:style-name="ce7" office:value-type="string" calcext:value-type="string">
            <text:p>service:org.giuseppe-vizziello.leeno.dispatcher?LeenoPdf.MENU_Pdf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Settings.MENU_PrintSettings()</text:p>
          </table:table-cell>
          <table:table-cell table:style-name="ce5" office:value-type="string" calcext:value-type="string">
            <text:p>LeenoSettings</text:p>
          </table:table-cell>
          <table:table-cell table:style-name="ce7" office:value-type="string" calcext:value-type="string">
            <text:p>Impostazioni di stampa e export PDF</text:p>
          </table:table-cell>
          <table:table-cell table:style-name="ce7" office:value-type="string" calcext:value-type="string">
            <text:p>Crea e restituisce una finestra di dialogo per modificare le impostazioni di stampa. Returns: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rintsettings</text:p>
          </table:table-cell>
          <table:table-cell table:style-name="ce7" office:value-type="string" calcext:value-type="string">
            <text:p>Icona outline coordinata per la funzione impostazioni di stampa e export pdf. Progettata su griglia 24x24 con spessore di 1.5px.</text:p>
          </table:table-cell>
          <table:table-cell table:style-name="ce7" office:value-type="string" calcext:value-type="string">
            <text:p>service:org.giuseppe-vizziello.leeno.dispatcher?LeenoSettings.MENU_PrintSettings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SheetUtils.MENU_SheetToDoc()</text:p>
          </table:table-cell>
          <table:table-cell table:style-name="ce5" office:value-type="string" calcext:value-type="string">
            <text:p>LeenoSheetUtils</text:p>
          </table:table-cell>
          <table:table-cell table:style-name="ce7" office:value-type="string" calcext:value-type="string">
            <text:p>Copia Foglio corrente in Nuovo File</text:p>
          </table:table-cell>
          <table:table-cell table:style-name="ce7" office:value-type="string" calcext:value-type="string">
            <text:p>Copia il foglio corrente in un nuovo documento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heettodoc</text:p>
          </table:table-cell>
          <table:table-cell table:style-name="ce7" office:value-type="string" calcext:value-type="string">
            <text:p>Icona outline coordinata per la funzione copia foglio corrente in nuovo file. Progettata su griglia 24x24 con spessore di 1.5px.</text:p>
          </table:table-cell>
          <table:table-cell table:style-name="ce7" office:value-type="string" calcext:value-type="string">
            <text:p>service:org.giuseppe-vizziello.leeno.dispatcher?LeenoSheetUtils.MENU_SheetToDoc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SheetUtils.MENU_elimina_righe_vuote()</text:p>
          </table:table-cell>
          <table:table-cell table:style-name="ce5" office:value-type="string" calcext:value-type="string">
            <text:p>LeenoSheetUtils</text:p>
          </table:table-cell>
          <table:table-cell table:style-name="ce7" office:value-type="string" calcext:value-type="string">
            <text:p>Elimina le righe vuote</text:p>
          </table:table-cell>
          <table:table-cell table:style-name="ce7" office:value-type="string" calcext:value-type="string">
            <text:p>Elimina le righe vuote negli elaborati di COMPUTO, VARIANTE o CONTABILITA</text:p>
          </table:table-cell>
          <table:table-cell table:number-columns-repeated="2" table:style-name="ce8" office:value-type="string" calcext:value-type="string">
            <text:p>elimina_vuote</text:p>
          </table:table-cell>
          <table:table-cell table:style-name="ce7" office:value-type="string" calcext:value-type="string">
            <text:p>Primitiva elenco multi-riga con righe vuote evidenziate e un badge di eliminazione</text:p>
          </table:table-cell>
          <table:table-cell table:style-name="ce7" office:value-type="string" calcext:value-type="string">
            <text:p>service:org.giuseppe-vizziello.leeno.dispatcher?LeenoSheetUtils.MENU_elimina_righe_vuot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SheetUtils.cerca_errori()</text:p>
          </table:table-cell>
          <table:table-cell table:style-name="ce5" office:value-type="string" calcext:value-type="string">
            <text:p>LeenoSheetUtils</text:p>
          </table:table-cell>
          <table:table-cell table:style-name="ce7" office:value-type="string" calcext:value-type="string">
            <text:p>Cerca errori nel foglio attivo</text:p>
          </table:table-cell>
          <table:table-cell table:style-name="ce7" office:value-type="string" calcext:value-type="string">
            <text:p>Cerca celle contenenti errori (#N/D, #DIV/0!, ecc.) in Calc partendo dalla selezione corrente fino alla fine del foglio.</text:p>
          </table:table-cell>
          <table:table-cell table:style-name="ce8" office:value-type="string" calcext:value-type="string">
            <text:p>imageNA</text:p>
          </table:table-cell>
          <table:table-cell table:style-name="ce8" office:value-type="string" calcext:value-type="string">
            <text:p>cerca_errori</text:p>
          </table:table-cell>
          <table:table-cell table:style-name="ce7" office:value-type="string" calcext:value-type="string">
            <text:p>Primitiva documento combinata con un badge di errore (punto esclamativo in cerchio) e una piccola lente d'ingrandimento sovrapposta.</text:p>
          </table:table-cell>
          <table:table-cell table:style-name="ce7" office:value-type="string" calcext:value-type="string">
            <text:p>service:org.giuseppe-vizziello.leeno.dispatcher?LeenoSheetUtils.cerca_error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LeenoSheetUtils.riepilogo_quantita()</text:p>
          </table:table-cell>
          <table:table-cell table:style-name="ce5" office:value-type="string" calcext:value-type="string">
            <text:p>LeenoSheetUtils</text:p>
          </table:table-cell>
          <table:table-cell table:style-name="ce7" office:value-type="string" calcext:value-type="string">
            <text:p>Riepilogo quantitativo</text:p>
          </table:table-cell>
          <table:table-cell table:style-name="ce7" office:value-type="string" calcext:value-type="string">
            <text:p>Inserisce colonne di riepilogo per Computo, Variante e Contabilità su ogni voce del foglio attivo.</text:p>
          </table:table-cell>
          <table:table-cell table:number-columns-repeated="2" table:style-name="ce8" office:value-type="string" calcext:value-type="string">
            <text:p>riepilogo_quantita</text:p>
          </table:table-cell>
          <table:table-cell table:style-name="ce7" office:value-type="string" calcext:value-type="string">
            <text:p>Primitiva documento contenente il contorno di un mini grafico a barre</text:p>
          </table:table-cell>
          <table:table-cell table:style-name="ce7" office:value-type="string" calcext:value-type="string">
            <text:p>service:org.giuseppe-vizziello.leeno.dispatcher?LeenoSheetUtils.riepilogo_quantit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Theme.applica_nuovo_colore_tematico()</text:p>
          </table:table-cell>
          <table:table-cell table:style-name="ce5" office:value-type="string" calcext:value-type="string">
            <text:p>LeenoTheme</text:p>
          </table:table-cell>
          <table:table-cell table:style-name="ce7" office:value-type="string" calcext:value-type="string">
            <text:p>Cambia Colore al Tema (da cella attiva)...</text:p>
          </table:table-cell>
          <table:table-cell table:style-name="ce7" office:value-type="string" calcext:value-type="string">
            <text:p>Identifica il colore della cella attiva e lo sostituisce in tutti gli stili del documento, gestendo la protezione di ogni singolo foglio.</text:p>
          </table:table-cell>
          <table:table-cell table:number-columns-repeated="2" table:style-name="ce8" office:value-type="string" calcext:value-type="string">
            <text:p>colore_tematico</text:p>
          </table:table-cell>
          <table:table-cell table:style-name="ce7" office:value-type="string" calcext:value-type="string">
            <text:p>Un contorno di secchio di vernice che versa una goccia di colore Lime Accent</text:p>
          </table:table-cell>
          <table:table-cell table:style-name="ce7" office:value-type="string" calcext:value-type="string">
            <text:p>service:org.giuseppe-vizziello.leeno.dispatcher?LeenoTheme.applica_nuovo_colore_tematico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LeenoTheme.dialogo_gestione_decimali()</text:p>
          </table:table-cell>
          <table:table-cell table:style-name="ce5" office:value-type="string" calcext:value-type="string">
            <text:p>LeenoTheme</text:p>
          </table:table-cell>
          <table:table-cell table:style-name="ce7" office:value-type="string" calcext:value-type="string">
            <text:p>Arrotondamenti e Decimali...</text:p>
          </table:table-cell>
          <table:table-cell table:style-name="ce7" office:value-type="string" calcext:value-type="string">
            <text:p>Dialogo IDE con vincolo: Quantità e Sommano condividono lo stesso valore.</text:p>
          </table:table-cell>
          <table:table-cell table:style-name="ce8" office:value-type="string" calcext:value-type="string">
            <text:p>decimali</text:p>
          </table:table-cell>
          <table:table-cell table:style-name="ce8" office:value-type="string" calcext:value-type="string">
            <text:p>arrotondamenti_decimali</text:p>
          </table:table-cell>
          <table:table-cell table:style-name="ce7" office:value-type="string" calcext:value-type="string">
            <text:p>Profilo di un numero decimale (es. 0.00) con frecce che indicano l'incremento o decremento delle posizioni decimali.</text:p>
          </table:table-cell>
          <table:table-cell table:style-name="ce7" office:value-type="string" calcext:value-type="string">
            <text:p>service:org.giuseppe-vizziello.leeno.dispatcher?LeenoTheme.dialogo_gestione_decimal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OTHER..uno:OpenHyperlink?URL:string=https://leeno.org/about-leeno/()</text:p>
          </table:table-cell>
          <table:table-cell table:style-name="ce5" office:value-type="string" calcext:value-type="string">
            <text:p>OTHER</text:p>
          </table:table-cell>
          <table:table-cell table:style-name="ce7" office:value-type="string" calcext:value-type="string">
            <text:p>About LeenO...</text:p>
          </table:table-cell>
          <table:table-cell table:style-name="ce7" office:value-type="string" calcext:value-type="string">
            <text:p>Funzione per la gestione delle operazioni di .uno:openhyperlink?url:string=https://leeno.org/about-leeno/ nell'interfaccia di LeenO.</text:p>
          </table:table-cell>
          <table:table-cell table:number-columns-repeated="2" table:style-name="ce8" office:value-type="string" calcext:value-type="string">
            <text:p>leeno</text:p>
          </table:table-cell>
          <table:table-cell table:style-name="ce7" office:value-type="string" calcext:value-type="string">
            <text:p>Marchio piatto e coeso. Lettere 'L' e 'O' intrecciate in stile outline vettoriale.</text:p>
          </table:table-cell>
          <table:table-cell table:style-name="ce7" office:value-type="string" calcext:value-type="string">
            <text:p>.uno:OpenHyperlink?URL:string=https://leeno.org/about-leeno/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OTHER..uno:OpenHyperlink?URL:string=https://leeno.org/licenza-2/()</text:p>
          </table:table-cell>
          <table:table-cell table:style-name="ce5" office:value-type="string" calcext:value-type="string">
            <text:p>OTHER</text:p>
          </table:table-cell>
          <table:table-cell table:style-name="ce7" office:value-type="string" calcext:value-type="string">
            <text:p>Licenza...</text:p>
          </table:table-cell>
          <table:table-cell table:style-name="ce7" office:value-type="string" calcext:value-type="string">
            <text:p>Funzione per la gestione delle operazioni di .uno:openhyperlink?url:string=https://leeno.org/licenza-2/ nell'interfaccia di LeenO.</text:p>
          </table:table-cell>
          <table:table-cell table:number-columns-repeated="2" table:style-name="ce8" office:value-type="string" calcext:value-type="string">
            <text:p>leeno</text:p>
          </table:table-cell>
          <table:table-cell table:style-name="ce7" office:value-type="string" calcext:value-type="string">
            <text:p>Marchio piatto e coeso. Lettere 'L' e 'O' intrecciate in stile outline vettoriale.</text:p>
          </table:table-cell>
          <table:table-cell table:style-name="ce7" office:value-type="string" calcext:value-type="string">
            <text:p>.uno:OpenHyperlink?URL:string=https://leeno.org/licenza-2/</text:p>
          </table:table-cell>
          <table:table-cell table:style-name="ce3" table:number-columns-repeated="16376"/>
        </table:table-row>
        <table:table-row table:style-name="ro4">
          <table:table-cell table:style-name="ce2" office:value-type="string" calcext:value-type="string">
            <text:p>OTHER..uno:OpenHyperlink?URL:string=https://t.me/leeno_computometrico()</text:p>
          </table:table-cell>
          <table:table-cell table:style-name="ce5" office:value-type="string" calcext:value-type="string">
            <text:p>OTHER</text:p>
          </table:table-cell>
          <table:table-cell table:style-name="ce7" office:value-type="string" calcext:value-type="string">
            <text:p>Unisciti al gruppo LeenO su Telegram...</text:p>
          </table:table-cell>
          <table:table-cell table:style-name="ce7" office:value-type="string" calcext:value-type="string">
            <text:p>Funzione per la gestione delle operazioni di .uno:openhyperlink?url:string=https://t.me/leeno computometrico nell'interfaccia di LeenO.</text:p>
          </table:table-cell>
          <table:table-cell table:number-columns-repeated="2" table:style-name="ce8" office:value-type="string" calcext:value-type="string">
            <text:p>teleg</text:p>
          </table:table-cell>
          <table:table-cell table:style-name="ce7" office:value-type="string" calcext:value-type="string">
            <text:p>Profilo minimalista di aeroplano di carta con tratto da 2px</text:p>
          </table:table-cell>
          <table:table-cell table:style-name="ce7" office:value-type="string" calcext:value-type="string">
            <text:p>.uno:OpenHyperlink?URL:string=https://t.me/leeno_computometric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SheetUtils.MENU_unisci_fogli()</text:p>
          </table:table-cell>
          <table:table-cell table:style-name="ce5" office:value-type="string" calcext:value-type="string">
            <text:p>SheetUtils</text:p>
          </table:table-cell>
          <table:table-cell table:style-name="ce7" office:value-type="string" calcext:value-type="string">
            <text:p>Unisci tutti i fogli</text:p>
          </table:table-cell>
          <table:table-cell table:style-name="ce7" office:value-type="string" calcext:value-type="string">
            <text:p>unisci fogli serve per unire tanti fogli in un unico foglio</text:p>
          </table:table-cell>
          <table:table-cell table:number-columns-repeated="2" table:style-name="ce8" office:value-type="string" calcext:value-type="string">
            <text:p>unisci_fogli</text:p>
          </table:table-cell>
          <table:table-cell table:style-name="ce7" office:value-type="string" calcext:value-type="string">
            <text:p>Due singole schede di foglio che si uniscono in un unico foglio contenitore in primo piano.</text:p>
          </table:table-cell>
          <table:table-cell table:style-name="ce7" office:value-type="string" calcext:value-type="string">
            <text:p>service:org.giuseppe-vizziello.leeno.dispatcher?SheetUtils.MENU_unisci_fogl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Copia_riga_Ent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Aggiungi rigo di misura</text:p>
          </table:table-cell>
          <table:table-cell table:style-name="ce7" office:value-type="string" calcext:value-type="string">
            <text:p>Aggiunge un rigo di misura vuoto o precompilato sotto la voce attiva per descrivere le dimensioni delle lavorazioni.</text:p>
          </table:table-cell>
          <table:table-cell table:style-name="ce8" office:value-type="string" calcext:value-type="string">
            <text:p>compo</text:p>
          </table:table-cell>
          <table:table-cell table:style-name="ce8" office:value-type="string" calcext:value-type="string">
            <text:p>aggiungi_misura</text:p>
          </table:table-cell>
          <table:table-cell table:style-name="ce7" office:value-type="string" calcext:value-type="string">
            <text:p>Una primitiva foglio con una linea orizzontale e un badge più (`+`)</text:p>
          </table:table-cell>
          <table:table-cell table:style-name="ce7" office:value-type="string" calcext:value-type="string">
            <text:p>service:org.giuseppe-vizziello.leeno.dispatcher?pyleeno.MENU_Copia_riga_Ent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ser_Capitol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Categoria</text:p>
          </table:table-cell>
          <table:table-cell table:style-name="ce7" office:value-type="string" calcext:value-type="string">
            <text:p>Funzione per la gestione delle operazioni di inser capitolo nell'interfaccia di LeenO.</text:p>
          </table:table-cell>
          <table:table-cell table:number-columns-repeated="2" table:style-name="ce8" office:value-type="string" calcext:value-type="string">
            <text:p>cat</text:p>
          </table:table-cell>
          <table:table-cell table:style-name="ce7" office:value-type="string" calcext:value-type="string">
            <text:p>Una primitiva cartella contenente il numero romano "II"</text:p>
          </table:table-cell>
          <table:table-cell table:style-name="ce7" office:value-type="string" calcext:value-type="string">
            <text:p>service:org.giuseppe-vizziello.leeno.dispatcher?pyleeno.MENU_Inser_Capitol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ser_SottoCapitol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SottoCategoria</text:p>
          </table:table-cell>
          <table:table-cell table:style-name="ce7" office:value-type="string" calcext:value-type="string">
            <text:p>Funzione per la gestione delle operazioni di inser sottocapitolo nell'interfaccia di LeenO.</text:p>
          </table:table-cell>
          <table:table-cell table:number-columns-repeated="2" table:style-name="ce8" office:value-type="string" calcext:value-type="string">
            <text:p>subcat</text:p>
          </table:table-cell>
          <table:table-cell table:style-name="ce7" office:value-type="string" calcext:value-type="string">
            <text:p>Una primitiva cartella contenente il numero romano "III"</text:p>
          </table:table-cell>
          <table:table-cell table:style-name="ce7" office:value-type="string" calcext:value-type="string">
            <text:p>service:org.giuseppe-vizziello.leeno.dispatcher?pyleeno.MENU_Inser_SottoCapitol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ser_SuperCapitol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SuperCategoria</text:p>
          </table:table-cell>
          <table:table-cell table:style-name="ce7" office:value-type="string" calcext:value-type="string">
            <text:p>Funzione per la gestione delle operazioni di inser supercapitolo nell'interfaccia di LeenO.</text:p>
          </table:table-cell>
          <table:table-cell table:number-columns-repeated="2" table:style-name="ce8" office:value-type="string" calcext:value-type="string">
            <text:p>supcat</text:p>
          </table:table-cell>
          <table:table-cell table:style-name="ce7" office:value-type="string" calcext:value-type="string">
            <text:p>Una primitiva cartella contenente il numero romano "I"</text:p>
          </table:table-cell>
          <table:table-cell table:style-name="ce7" office:value-type="string" calcext:value-type="string">
            <text:p>service:org.giuseppe-vizziello.leeno.dispatcher?pyleeno.MENU_Inser_SuperCapitolo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XPWE_export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sporta dati in archivio XPWE</text:p>
          </table:table-cell>
          <table:table-cell table:style-name="ce7" office:value-type="string" calcext:value-type="string">
            <text:p>Esporta l'intero computo metrico o contabilità nel formato standard XPWE compatibile con PriMus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pwe_export</text:p>
          </table:table-cell>
          <table:table-cell table:style-name="ce7" office:value-type="string" calcext:value-type="string">
            <text:p>Icona outline coordinata per la funzione esporta dati in archivio xpwe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XPWE_export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analisi_in_ElencoPrezz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Crea Nuovo Prezzo dall'Analisi</text:p>
          </table:table-cell>
          <table:table-cell table:style-name="ce7" office:value-type="string" calcext:value-type="string">
            <text:p>Invia l'analisi in Elenco Prezzi.</text:p>
          </table:table-cell>
          <table:table-cell table:style-name="ce8" office:value-type="string" calcext:value-type="string">
            <text:p>2ep</text:p>
          </table:table-cell>
          <table:table-cell table:style-name="ce8" office:value-type="string" calcext:value-type="string">
            <text:p>analisi_a_prezzo</text:p>
          </table:table-cell>
          <table:table-cell table:style-name="ce7" office:value-type="string" calcext:value-type="string">
            <text:p>Due contorni di documento sovrapposti con un percorso di frecce</text:p>
          </table:table-cell>
          <table:table-cell table:style-name="ce7" office:value-type="string" calcext:value-type="string">
            <text:p>service:org.giuseppe-vizziello.leeno.dispatcher?pyleeno.MENU_analisi_in_ElencoPrezz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apri_manual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anuale...</text:p>
          </table:table-cell>
          <table:table-cell table:style-name="ce7" office:value-type="string" calcext:value-type="string">
            <text:p>Apre il manuale utente di LeenO in formato PDF. Utilizza il gestore di sistema predefinito per aprire il file MANUALE_LeenO.pdf</text:p>
          </table:table-cell>
          <table:table-cell table:number-columns-repeated="2" table:style-name="ce8" office:value-type="string" calcext:value-type="string">
            <text:p>manuale</text:p>
          </table:table-cell>
          <table:table-cell table:style-name="ce7" office:value-type="string" calcext:value-type="string">
            <text:p>Un'icona documento piatta con un angolo piegato e un simbolo di informazioni (`i`)</text:p>
          </table:table-cell>
          <table:table-cell table:style-name="ce7" office:value-type="string" calcext:value-type="string">
            <text:p>service:org.giuseppe-vizziello.leeno.dispatcher?pyleeno.MENU_apri_manual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azzera_vo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Azzera una voce di computo</text:p>
          </table:table-cell>
          <table:table-cell table:style-name="ce7" office:value-type="string" calcext:value-type="string">
            <text:p>Azzera la quantità di una voce e ne raggruppa le relative righe</text:p>
          </table:table-cell>
          <table:table-cell table:number-columns-repeated="2" table:style-name="ce8" office:value-type="string" calcext:value-type="string">
            <text:p>azzera</text:p>
          </table:table-cell>
          <table:table-cell table:style-name="ce7" office:value-type="string" calcext:value-type="string">
            <text:p>Una grande cifra `0` in Arancione Azione con un tratto da 2px</text:p>
          </table:table-cell>
          <table:table-cell table:style-name="ce7" office:value-type="string" calcext:value-type="string">
            <text:p>service:org.giuseppe-vizziello.leeno.dispatcher?pyleeno.MENU_azzera_voc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cerca_in_elenc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Trova voce in Elenco Prezzi o Analisi di Prezzo</text:p>
          </table:table-cell>
          <table:table-cell table:style-name="ce7" office:value-type="string" calcext:value-type="string">
            <text:p>Evidenzia il codice di elenco prezzi della voce corrente.</text:p>
          </table:table-cell>
          <table:table-cell table:style-name="ce8" office:value-type="string" calcext:value-type="string">
            <text:p>findcode</text:p>
          </table:table-cell>
          <table:table-cell table:style-name="ce8" office:value-type="string" calcext:value-type="string">
            <text:p>trova_voce</text:p>
          </table:table-cell>
          <table:table-cell table:style-name="ce7" office:value-type="string" calcext:value-type="string">
            <text:p>Una primitiva documento combinata con una lente d'ingrandimento in primo piano, a indicare la ricerca del codice.</text:p>
          </table:table-cell>
          <table:table-cell table:style-name="ce7" office:value-type="string" calcext:value-type="string">
            <text:p>service:org.giuseppe-vizziello.leeno.dispatcher?pyleeno.MENU_cerca_in_elenc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converti_stringh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Converti Stringhe in Numeri</text:p>
          </table:table-cell>
          <table:table-cell table:style-name="ce7" office:value-type="string" calcext:value-type="string">
            <text:p>Converte in numeri le stringhe o viceversa.</text:p>
          </table:table-cell>
          <table:table-cell table:style-name="ce8" office:value-type="string" calcext:value-type="string">
            <text:p>image16</text:p>
          </table:table-cell>
          <table:table-cell table:style-name="ce8" office:value-type="string" calcext:value-type="string">
            <text:p>stringhe_numeri</text:p>
          </table:table-cell>
          <table:table-cell table:style-name="ce7" office:value-type="string" calcext:value-type="string">
            <text:p>Profilo del testo `A` che punta tramite una freccia destra (`→`) a un numero `1`</text:p>
          </table:table-cell>
          <table:table-cell table:style-name="ce7" office:value-type="string" calcext:value-type="string">
            <text:p>service:org.giuseppe-vizziello.leeno.dispatcher?pyleeno.MENU_converti_stringhe</text:p>
          </table:table-cell>
          <table:table-cell table:style-name="ce3" table:number-columns-repeated="16376"/>
        </table:table-row>
        <table:table-row table:style-name="ro4">
          <table:table-cell table:style-name="ce2" office:value-type="string" calcext:value-type="string">
            <text:p>pyleeno.MENU_copia_celle_visibil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Copia solo celle visibili</text:p>
          </table:table-cell>
          <table:table-cell table:style-name="ce7" office:value-type="string" calcext:value-type="string">
            <text:p>Copia negli appunti solo le celle visibili della selezione corrente. Utilizza un foglio temporaneo per consolidare i dati ed evitare celle vuote intermedie.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pia_celle_visibili</text:p>
          </table:table-cell>
          <table:table-cell table:style-name="ce7" office:value-type="string" calcext:value-type="string">
            <text:p>Icona outline coordinata per la funzione copia solo celle visibili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copia_celle_visibil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debug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python debug</text:p>
          </table:table-cell>
          <table:table-cell table:style-name="ce7" office:value-type="string" calcext:value-type="string">
            <text:p>Funzione per la gestione delle operazioni di debug nell'interfaccia di LeenO.</text:p>
          </table:table-cell>
          <table:table-cell table:style-name="ce8" office:value-type="string" calcext:value-type="string">
            <text:p>py</text:p>
          </table:table-cell>
          <table:table-cell table:style-name="ce8" office:value-type="string" calcext:value-type="string">
            <text:p>python_debug</text:p>
          </table:table-cell>
          <table:table-cell table:style-name="ce7" office:value-type="string" calcext:value-type="string">
            <text:p>Il logo Python (profilo vettoriale semplificato di due serpenti)</text:p>
          </table:table-cell>
          <table:table-cell table:style-name="ce7" office:value-type="string" calcext:value-type="string">
            <text:p>service:org.giuseppe-vizziello.leeno.dispatcher?pyleeno.MENU_debug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doppion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imina codici doppi in Elenco Prezzi</text:p>
          </table:table-cell>
          <table:table-cell table:style-name="ce7" office:value-type="string" calcext:value-type="string">
            <text:p>Scansiona l'Elenco Prezzi e rimuove in modo sicuro le voci che presentano lo stesso codice identificativo.</text:p>
          </table:table-cell>
          <table:table-cell table:style-name="ce8" office:value-type="string" calcext:value-type="string">
            <text:p>image21B</text:p>
          </table:table-cell>
          <table:table-cell table:style-name="ce8" office:value-type="string" calcext:value-type="string">
            <text:p>elimina_doppioni</text:p>
          </table:table-cell>
          <table:table-cell table:style-name="ce7" office:value-type="string" calcext:value-type="string">
            <text:p>Due primitive foglio sovrapposte con una sovrapposizione di sottrazione/cestino</text:p>
          </table:table-cell>
          <table:table-cell table:style-name="ce7" office:value-type="string" calcext:value-type="string">
            <text:p>service:org.giuseppe-vizziello.leeno.dispatcher?pyleeno.MENU_doppion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elenco_puntato_misur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enco puntato misure (-)</text:p>
          </table:table-cell>
          <table:table-cell table:style-name="ce7" office:value-type="string" calcext:value-type="string">
            <text:p>Aggiunge il trattino (-) alle righe di misu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lenco_puntato_misure</text:p>
          </table:table-cell>
          <table:table-cell table:style-name="ce7" office:value-type="string" calcext:value-type="string">
            <text:p>Icona outline coordinata per la funzione elenco puntato misure (-)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elenco_puntato_misure</text:p>
          </table:table-cell>
          <table:table-cell table:style-name="ce3" table:number-columns-repeated="16376"/>
        </table:table-row>
        <table:table-row table:style-name="ro4">
          <table:table-cell table:style-name="ce2" office:value-type="string" calcext:value-type="string">
            <text:p>pyleeno.MENU_elimina_righ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IMINA le righe attive/selezionate</text:p>
          </table:table-cell>
          <table:table-cell table:style-name="ce7" office:value-type="string" calcext:value-type="string">
            <text:p>Elimina le righe selezionate (contigue o no) ottimizzando le operazioni UNO. Raggruppa i blocchi contigui e li elimina con una sola removeByIndex per blocco.</text:p>
          </table:table-cell>
          <table:table-cell table:style-name="ce8" office:value-type="string" calcext:value-type="string">
            <text:p>cross</text:p>
          </table:table-cell>
          <table:table-cell table:style-name="ce8" office:value-type="string" calcext:value-type="string">
            <text:p>elimina_righe</text:p>
          </table:table-cell>
          <table:table-cell table:style-name="ce7" office:value-type="string" calcext:value-type="string">
            <text:p>Linee parallele orizzontali (righe) con una croce diagonale rossa (×) sovrapposta a destra.</text:p>
          </table:table-cell>
          <table:table-cell table:style-name="ce7" office:value-type="string" calcext:value-type="string">
            <text:p>service:org.giuseppe-vizziello.leeno.dispatcher?pyleeno.MENU_elimina_righ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elimina_vo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imina voce</text:p>
          </table:table-cell>
          <table:table-cell table:style-name="ce7" office:value-type="string" calcext:value-type="string">
            <text:p>Elimina interamente la voce selezionata e tutte le sue righe di misura associate dal foglio attivo.</text:p>
          </table:table-cell>
          <table:table-cell table:style-name="ce8" office:value-type="string" calcext:value-type="string">
            <text:p>cestino</text:p>
          </table:table-cell>
          <table:table-cell table:style-name="ce8" office:value-type="string" calcext:value-type="string">
            <text:p>elimina_voce</text:p>
          </table:table-cell>
          <table:table-cell table:style-name="ce7" office:value-type="string" calcext:value-type="string">
            <text:p>Contorno minimalista di un cestino dei rifiuti con coperchio sollevato, in Arancione Azione.</text:p>
          </table:table-cell>
          <table:table-cell table:style-name="ce7" office:value-type="string" calcext:value-type="string">
            <text:p>service:org.giuseppe-vizziello.leeno.dispatcher?pyleeno.MENU_elimina_voc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elimina_voci_azzerat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imina le voci di computo azzerate</text:p>
          </table:table-cell>
          <table:table-cell table:style-name="ce7" office:value-type="string" calcext:value-type="string">
            <text:p>Elimina le voci in cui compare la dicitura '*** VOCE AZZERATA ***' in COMPUTO o in VARIANTE, senza chiedere conferma</text:p>
          </table:table-cell>
          <table:table-cell table:number-columns-repeated="2" table:style-name="ce8" office:value-type="string" calcext:value-type="string">
            <text:p>elimina_azzerate</text:p>
          </table:table-cell>
          <table:table-cell table:style-name="ce7" office:value-type="string" calcext:value-type="string">
            <text:p>Primitiva documento con uno zero (`0`) e un chiaro badge di eliminazione (`×`)</text:p>
          </table:table-cell>
          <table:table-cell table:style-name="ce7" office:value-type="string" calcext:value-type="string">
            <text:p>service:org.giuseppe-vizziello.leeno.dispatcher?pyleeno.MENU_elimina_voci_azzerat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evidenzia_in_elenc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videnzia voci in Elenco Prezzi</text:p>
          </table:table-cell>
          <table:table-cell table:style-name="ce7" office:value-type="string" calcext:value-type="string">
            <text:p>Evidenzia le voci selezionate in Elenco Prezzi.</text:p>
          </table:table-cell>
          <table:table-cell table:style-name="ce8" office:value-type="string" calcext:value-type="string">
            <text:p>findcode</text:p>
          </table:table-cell>
          <table:table-cell table:style-name="ce8" office:value-type="string" calcext:value-type="string">
            <text:p>trova_voce</text:p>
          </table:table-cell>
          <table:table-cell table:style-name="ce7" office:value-type="string" calcext:value-type="string">
            <text:p>Una primitiva documento combinata con una lente d'ingrandimento in primo piano, a indicare la ricerca del codice.</text:p>
          </table:table-cell>
          <table:table-cell table:style-name="ce7" office:value-type="string" calcext:value-type="string">
            <text:p>service:org.giuseppe-vizziello.leeno.dispatcher?pyleeno.MENU_evidenzia_in_elenc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filtra_codi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Filtra Codice della voce corrente</text:p>
          </table:table-cell>
          <table:table-cell table:style-name="ce7" office:value-type="string" calcext:value-type="string">
            <text:p>Funzione per la gestione delle operazioni di filtra codice nell'interfaccia di LeenO.</text:p>
          </table:table-cell>
          <table:table-cell table:style-name="ce8" office:value-type="string" calcext:value-type="string">
            <text:p>image444</text:p>
          </table:table-cell>
          <table:table-cell table:style-name="ce8" office:value-type="string" calcext:value-type="string">
            <text:p>filtra_codice</text:p>
          </table:table-cell>
          <table:table-cell table:style-name="ce7" office:value-type="string" calcext:value-type="string">
            <text:p>Un imbuto filtrante minimalista che racchiude o punta a un codice alfanumerico stilizzato.</text:p>
          </table:table-cell>
          <table:table-cell table:style-name="ce7" office:value-type="string" calcext:value-type="string">
            <text:p>service:org.giuseppe-vizziello.leeno.dispatcher?pyleeno.MENU_filtra_codic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firme_in_cal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Riepilogo e/o firme in calce</text:p>
          </table:table-cell>
          <table:table-cell table:style-name="ce7" office:value-type="string" calcext:value-type="string">
            <text:p>Inserisce automaticamente i riquadri e le righe per le firme dei progettisti, del direttore dei lavori e dell'impresa in calce al documento.</text:p>
          </table:table-cell>
          <table:table-cell table:number-columns-repeated="2" table:style-name="ce8" office:value-type="string" calcext:value-type="string">
            <text:p>riepilogo</text:p>
          </table:table-cell>
          <table:table-cell table:style-name="ce7" office:value-type="string" calcext:value-type="string">
            <text:p>Primitiva documento contenente linee e una penna stilografica in miniatura per firma</text:p>
          </table:table-cell>
          <table:table-cell table:style-name="ce7" office:value-type="string" calcext:value-type="string">
            <text:p>service:org.giuseppe-vizziello.leeno.dispatcher?pyleeno.MENU_firme_in_calc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grid_switch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ostra/Nascondi Griglia</text:p>
          </table:table-cell>
          <table:table-cell table:style-name="ce7" office:value-type="string" calcext:value-type="string">
            <text:p>Mostra / nasconde griglia</text:p>
          </table:table-cell>
          <table:table-cell table:style-name="ce8" office:value-type="string" calcext:value-type="string">
            <text:p>griglia3</text:p>
          </table:table-cell>
          <table:table-cell table:style-name="ce8" office:value-type="string" calcext:value-type="string">
            <text:p>mostra_griglia</text:p>
          </table:table-cell>
          <table:table-cell table:style-name="ce7" office:value-type="string" calcext:value-type="string">
            <text:p>Un profilo di griglia `3×3` pulito in Scuro con angoli esterni arrotondati</text:p>
          </table:table-cell>
          <table:table-cell table:style-name="ce7" office:value-type="string" calcext:value-type="string">
            <text:p>service:org.giuseppe-vizziello.leeno.dispatcher?pyleeno.MENU_grid_switch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importa_stil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mporta Stili da altro file...</text:p>
          </table:table-cell>
          <table:table-cell table:style-name="ce7" office:value-type="string" calcext:value-type="string">
            <text:p>Importa tutti gli stili da un documento di riferimento. Se non è selezionato, il file di riferimento è il template di leenO.</text:p>
          </table:table-cell>
          <table:table-cell table:style-name="ce8" office:value-type="string" calcext:value-type="string">
            <text:p>sfera_gialla</text:p>
          </table:table-cell>
          <table:table-cell table:style-name="ce8" office:value-type="string" calcext:value-type="string">
            <text:p>importa_stili</text:p>
          </table:table-cell>
          <table:table-cell table:style-name="ce7" office:value-type="string" calcext:value-type="string">
            <text:p>Un pennello in stile moderno sovrapposto a una scheda di foglio di calcolo</text:p>
          </table:table-cell>
          <table:table-cell table:style-name="ce7" office:value-type="string" calcext:value-type="string">
            <text:p>service:org.giuseppe-vizziello.leeno.dispatcher?pyleeno.MENU_importa_stil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serisci_Riga_rossa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riga rossa di chiusura</text:p>
          </table:table-cell>
          <table:table-cell table:style-name="ce7" office:value-type="string" calcext:value-type="string">
            <text:p>Inserisce la riga rossa di chiusura degli elaborati Questa riga è un riferimento per varie operazioni</text:p>
          </table:table-cell>
          <table:table-cell table:style-name="ce8" office:value-type="string" calcext:value-type="string">
            <text:p>image100</text:p>
          </table:table-cell>
          <table:table-cell table:style-name="ce8" office:value-type="string" calcext:value-type="string">
            <text:p>riga_rossa</text:p>
          </table:table-cell>
          <table:table-cell table:style-name="ce7" office:value-type="string" calcext:value-type="string">
            <text:p>Un evidenziatore rosso che punta a una linea di chiusura orizzontale</text:p>
          </table:table-cell>
          <table:table-cell table:style-name="ce7" office:value-type="string" calcext:value-type="string">
            <text:p>service:org.giuseppe-vizziello.leeno.dispatcher?pyleeno.MENU_inserisci_Riga_ross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inserisci_nuova_riga_con_descrizion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riga titolo in misure</text:p>
          </table:table-cell>
          <table:table-cell table:style-name="ce7" office:value-type="string" calcext:value-type="string">
            <text:p>inserisce, all'inizio di ogni voce di computo o variante, una nuova riga con una descrizione a scel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serisci_nuova_riga_con_descrizione</text:p>
          </table:table-cell>
          <table:table-cell table:style-name="ce7" office:value-type="string" calcext:value-type="string">
            <text:p>Icona outline coordinata per la funzione inserisci riga titolo in misure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inserisci_nuova_riga_con_descrizion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verti_segn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Quantità positiva/negativa</text:p>
          </table:table-cell>
          <table:table-cell table:style-name="ce7" office:value-type="string" calcext:value-type="string">
            <text:p>Inverte algebricamente il segno della quantità delle righe selezionate, alternandole tra positive e negative.</text:p>
          </table:table-cell>
          <table:table-cell table:style-name="ce8" office:value-type="string" calcext:value-type="string">
            <text:p>invert</text:p>
          </table:table-cell>
          <table:table-cell table:style-name="ce8" office:value-type="string" calcext:value-type="string">
            <text:p>inverti_segno</text:p>
          </table:table-cell>
          <table:table-cell table:style-name="ce7" office:value-type="string" calcext:value-type="string">
            <text:p>Segni `+` e `-` puliti affiancati con una freccia di commutazione orizzontale</text:p>
          </table:table-cell>
          <table:table-cell table:style-name="ce7" office:value-type="string" calcext:value-type="string">
            <text:p>service:org.giuseppe-vizziello.leeno.dispatcher?pyleeno.MENU_inverti_segn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invia_vo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via voci al DP</text:p>
          </table:table-cell>
          <table:table-cell table:style-name="ce7" office:value-type="string" calcext:value-type="string">
            <text:p>Invia le voci di prezzario selezionate direttamente al documento principale (DP) o all'Elenco Prezzi corrente.</text:p>
          </table:table-cell>
          <table:table-cell table:number-columns-repeated="2" table:style-name="ce8" office:value-type="string" calcext:value-type="string">
            <text:p>invia_voce_ep</text:p>
          </table:table-cell>
          <table:table-cell table:style-name="ce7" office:value-type="string" calcext:value-type="string">
            <text:p>Primitiva documento con una freccia uscente (`→`) verso destra</text:p>
          </table:table-cell>
          <table:table-cell table:style-name="ce7" office:value-type="string" calcext:value-type="string">
            <text:p>service:org.giuseppe-vizziello.leeno.dispatcher?pyleeno.MENU_invia_voc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mostra_fogl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ostra tutti i fogli</text:p>
          </table:table-cell>
          <table:table-cell table:style-name="ce7" office:value-type="string" calcext:value-type="string">
            <text:p>Mostra tutti i foglio fog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ostra_fogli</text:p>
          </table:table-cell>
          <table:table-cell table:style-name="ce7" office:value-type="string" calcext:value-type="string">
            <text:p>Icona outline coordinata per la funzione mostra tutti i fogli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mostra_fogl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mostra_fogli_principal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ostra solo i fogli principali</text:p>
          </table:table-cell>
          <table:table-cell table:style-name="ce7" office:value-type="string" calcext:value-type="string">
            <text:p>Mostra tutti i foglio fog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ostra_fogli_principali</text:p>
          </table:table-cell>
          <table:table-cell table:style-name="ce7" office:value-type="string" calcext:value-type="string">
            <text:p>Icona outline coordinata per la funzione mostra solo i fogli principali. Progettata su griglia 24x24 con spessore di 1.5px.</text:p>
          </table:table-cell>
          <table:table-cell table:style-name="ce7" office:value-type="string" calcext:value-type="string">
            <text:p>service:org.giuseppe-vizziello.leeno.dispatcher?pyleeno.MENU_mostra_fogli_principal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mostra_tabs_comput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ostra le Copertine del COMPUTO</text:p>
          </table:table-cell>
          <table:table-cell table:style-name="ce7" office:value-type="string" calcext:value-type="string">
            <text:p>Mostra tutti i foglio fogli</text:p>
          </table:table-cell>
          <table:table-cell table:style-name="ce8" office:value-type="string" calcext:value-type="string">
            <text:p>vintage</text:p>
          </table:table-cell>
          <table:table-cell table:style-name="ce8" office:value-type="string" calcext:value-type="string">
            <text:p>copertine</text:p>
          </table:table-cell>
          <table:table-cell table:style-name="ce7" office:value-type="string" calcext:value-type="string">
            <text:p>Un contorno visivo di cartella ad anelli che mostra i segnaposto della copertina</text:p>
          </table:table-cell>
          <table:table-cell table:style-name="ce7" office:value-type="string" calcext:value-type="string">
            <text:p>service:org.giuseppe-vizziello.leeno.dispatcher?pyleeno.MENU_mostra_tabs_comput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mostra_tabs_contab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ostra le Copertine di Contabilita'</text:p>
          </table:table-cell>
          <table:table-cell table:style-name="ce7" office:value-type="string" calcext:value-type="string">
            <text:p>Mostra tutti i foglio fogli</text:p>
          </table:table-cell>
          <table:table-cell table:style-name="ce8" office:value-type="string" calcext:value-type="string">
            <text:p>vintage</text:p>
          </table:table-cell>
          <table:table-cell table:style-name="ce8" office:value-type="string" calcext:value-type="string">
            <text:p>copertine</text:p>
          </table:table-cell>
          <table:table-cell table:style-name="ce7" office:value-type="string" calcext:value-type="string">
            <text:p>Un contorno visivo di cartella ad anelli che mostra i segnaposto della copertina</text:p>
          </table:table-cell>
          <table:table-cell table:style-name="ce7" office:value-type="string" calcext:value-type="string">
            <text:p>service:org.giuseppe-vizziello.leeno.dispatcher?pyleeno.MENU_mostra_tabs_contab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nasconde_voci_azzerat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Nascondi le voci azzerate</text:p>
          </table:table-cell>
          <table:table-cell table:style-name="ce7" office:value-type="string" calcext:value-type="string">
            <text:p>Nasconde le voci in cui compare la dicitura '*** VOCE AZZERATA ***' in COMPUTO o in VARIANTE.</text:p>
          </table:table-cell>
          <table:table-cell table:number-columns-repeated="2" table:style-name="ce8" office:value-type="string" calcext:value-type="string">
            <text:p>strutt_voci_zero</text:p>
          </table:table-cell>
          <table:table-cell table:style-name="ce7" office:value-type="string" calcext:value-type="string">
            <text:p>Primitiva struttura ad albero con uno zero sbarrato (`Ø`)</text:p>
          </table:table-cell>
          <table:table-cell table:style-name="ce7" office:value-type="string" calcext:value-type="string">
            <text:p>service:org.giuseppe-vizziello.leeno.dispatcher?pyleeno.MENU_nasconde_voci_azzerat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numera_voc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Rinumera voci e Categorie</text:p>
          </table:table-cell>
          <table:table-cell table:style-name="ce7" office:value-type="string" calcext:value-type="string">
            <text:p>Comando di menu per numera_voci()</text:p>
          </table:table-cell>
          <table:table-cell table:number-columns-repeated="2" table:style-name="ce8" office:value-type="string" calcext:value-type="string">
            <text:p>rinumCap</text:p>
          </table:table-cell>
          <table:table-cell table:style-name="ce7" office:value-type="string" calcext:value-type="string">
            <text:p>Primitiva elenco standard (`≡`) con un simbolo cancelletto adiacente (`#`)</text:p>
          </table:table-cell>
          <table:table-cell table:style-name="ce7" office:value-type="string" calcext:value-type="string">
            <text:p>service:org.giuseppe-vizziello.leeno.dispatcher?pyleeno.MENU_numera_voci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nuova_voce_scelta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Nuova Voce scelta</text:p>
          </table:table-cell>
          <table:table-cell table:style-name="ce7" office:value-type="string" calcext:value-type="string">
            <text:p>Contestualizza in ogni tabella l'inserimento delle voci.</text:p>
          </table:table-cell>
          <table:table-cell table:style-name="ce8" office:value-type="string" calcext:value-type="string">
            <text:p>image93</text:p>
          </table:table-cell>
          <table:table-cell table:style-name="ce8" office:value-type="string" calcext:value-type="string">
            <text:p>nuova_voce</text:p>
          </table:table-cell>
          <table:table-cell table:style-name="ce7" office:value-type="string" calcext:value-type="string">
            <text:p>Primitiva documento con un badge Più Verde (`+`) pulito in basso a destra</text:p>
          </table:table-cell>
          <table:table-cell table:style-name="ce7" office:value-type="string" calcext:value-type="string">
            <text:p>service:org.giuseppe-vizziello.leeno.dispatcher?pyleeno.MENU_nuova_voce_scelt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nuovo_comput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Computo</text:p>
          </table:table-cell>
          <table:table-cell table:style-name="ce7" office:value-type="string" calcext:value-type="string">
            <text:p>Crea un nuovo computo vuoto.</text:p>
          </table:table-cell>
          <table:table-cell table:style-name="ce8" office:value-type="string" calcext:value-type="string">
            <text:p>image15</text:p>
          </table:table-cell>
          <table:table-cell table:style-name="ce8" office:value-type="string" calcext:value-type="string">
            <text:p>nuovo_computo</text:p>
          </table:table-cell>
          <table:table-cell table:style-name="ce7" office:value-type="string" calcext:value-type="string">
            <text:p>Una primitiva di documento vuoto con un badge di aggiunta verde in basso a destra, indicando la creazione di un nuovo foglio computo.</text:p>
          </table:table-cell>
          <table:table-cell table:style-name="ce7" office:value-type="string" calcext:value-type="string">
            <text:p>service:org.giuseppe-vizziello.leeno.dispatcher?pyleeno.MENU_nuovo_comput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nuovo_usobollo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Documento UsoBollo</text:p>
          </table:table-cell>
          <table:table-cell table:style-name="ce7" office:value-type="string" calcext:value-type="string">
            <text:p>Crea un nuovo documento in formato uso bollo.</text:p>
          </table:table-cell>
          <table:table-cell table:number-columns-repeated="2" table:style-name="ce8" office:value-type="string" calcext:value-type="string">
            <text:p>documento_bollo</text:p>
          </table:table-cell>
          <table:table-cell table:style-name="ce7" office:value-type="string" calcext:value-type="string">
            <text:p>Un foglio di documento bordato contenente il profilo di un timbro a cera rotondo in Arancione Azione.</text:p>
          </table:table-cell>
          <table:table-cell table:style-name="ce7" office:value-type="string" calcext:value-type="string">
            <text:p>service:org.giuseppe-vizziello.leeno.dispatcher?pyleeno.MENU_nuovo_usobollo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parzial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parziale</text:p>
          </table:table-cell>
          <table:table-cell table:style-name="ce7" office:value-type="string" calcext:value-type="string">
            <text:p>Inserisce una riga con l'indicazione della somma parziale.</text:p>
          </table:table-cell>
          <table:table-cell table:number-columns-repeated="2" table:style-name="ce8" office:value-type="string" calcext:value-type="string">
            <text:p>parz</text:p>
          </table:table-cell>
          <table:table-cell table:style-name="ce7" office:value-type="string" calcext:value-type="string">
            <text:p>Un segno di sommatoria matematica (`∑`) all'interno di parentesi</text:p>
          </table:table-cell>
          <table:table-cell table:style-name="ce7" office:value-type="string" calcext:value-type="string">
            <text:p>service:org.giuseppe-vizziello.leeno.dispatcher?pyleeno.MENU_parzial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pesca_cod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Pesca Codice</text:p>
          </table:table-cell>
          <table:table-cell table:style-name="ce7" office:value-type="string" calcext:value-type="string">
            <text:p>Consente di prelevare il codice di una voce da una cella e inserirlo in modo associato nel rigo attivo.</text:p>
          </table:table-cell>
          <table:table-cell table:number-columns-repeated="2" table:style-name="ce8" office:value-type="string" calcext:value-type="string">
            <text:p>pesca</text:p>
          </table:table-cell>
          <table:table-cell table:style-name="ce7" office:value-type="string" calcext:value-type="string">
            <text:p>Un amo da pesca sagomato o una freccia che estrae il codice da una cella</text:p>
          </table:table-cell>
          <table:table-cell table:style-name="ce7" office:value-type="string" calcext:value-type="string">
            <text:p>service:org.giuseppe-vizziello.leeno.dispatcher?pyleeno.MENU_pesca_cod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prefisso_VDS_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Duplica voce corrente in Voce Della Sicurezza</text:p>
          </table:table-cell>
          <table:table-cell table:style-name="ce7" office:value-type="string" calcext:value-type="string">
            <text:p>Duplica la voce di Elenco Prezzi corrente aggiunge il prefisso 'VDS_' e individuandola come Voce Della Sicurezza</text:p>
          </table:table-cell>
          <table:table-cell table:style-name="ce8" office:value-type="string" calcext:value-type="string">
            <text:p>Caschetto</text:p>
          </table:table-cell>
          <table:table-cell table:style-name="ce8" office:value-type="string" calcext:value-type="string">
            <text:p>duplica_sicurezza</text:p>
          </table:table-cell>
          <table:table-cell table:style-name="ce7" office:value-type="string" calcext:value-type="string">
            <text:p>Primitiva di documento duplicato (due fogli sfalsati) con un piccolo simbolo con triangolo di pericolo o caschetto stilizzato</text:p>
          </table:table-cell>
          <table:table-cell table:style-name="ce7" office:value-type="string" calcext:value-type="string">
            <text:p>service:org.giuseppe-vizziello.leeno.dispatcher?pyleeno.MENU_prefisso_VDS_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ricicla_misur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Ricicla una voce dal Computo</text:p>
          </table:table-cell>
          <table:table-cell table:style-name="ce7" office:value-type="string" calcext:value-type="string">
            <text:p>In CONTABILITA consente l'inserimento di nuove voci di misurazione partendo da voci già inserite in COMPUTO o VARIANTE.</text:p>
          </table:table-cell>
          <table:table-cell table:style-name="ce8" office:value-type="string" calcext:value-type="string">
            <text:p>ricicla</text:p>
          </table:table-cell>
          <table:table-cell table:style-name="ce8" office:value-type="string" calcext:value-type="string">
            <text:p>ricicla_misure</text:p>
          </table:table-cell>
          <table:table-cell table:style-name="ce7" office:value-type="string" calcext:value-type="string">
            <text:p>Tre frecce ricurve in ciclo (simbolo universale del riciclo) con al centro un piccolo documento o rigo.</text:p>
          </table:table-cell>
          <table:table-cell table:style-name="ce7" office:value-type="string" calcext:value-type="string">
            <text:p>service:org.giuseppe-vizziello.leeno.dispatcher?pyleeno.MENU_ricicla_misur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riordina_ElencoPrezz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Riordina Voci (ordine alfabetico)</text:p>
          </table:table-cell>
          <table:table-cell table:style-name="ce7" office:value-type="string" calcext:value-type="string">
            <text:p>Ordina l'intero elenco prezzi del computo in ordine alfabetico o alfanumerico in base alla descrizione o al codice.</text:p>
          </table:table-cell>
          <table:table-cell table:number-columns-repeated="2" table:style-name="ce8" office:value-type="string" calcext:value-type="string">
            <text:p>riordina</text:p>
          </table:table-cell>
          <table:table-cell table:style-name="ce7" office:value-type="string" calcext:value-type="string">
            <text:p>Freccia verticale adiacente alle lettere 'A' e 'Z' impilate</text:p>
          </table:table-cell>
          <table:table-cell table:style-name="ce7" office:value-type="string" calcext:value-type="string">
            <text:p>service:org.giuseppe-vizziello.leeno.dispatcher?pyleeno.MENU_riordina_ElencoPrezz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sistema_pagin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Stampa...</text:p>
          </table:table-cell>
          <table:table-cell table:style-name="ce7" office:value-type="string" calcext:value-type="string">
            <text:p>msg { boolean } : se True mostra dialogo e lancia anteprima Configura intestazioni e pie' di pagina degli stili di stampa</text:p>
          </table:table-cell>
          <table:table-cell table:style-name="ce8" office:value-type="string" calcext:value-type="string">
            <text:p>print_ok</text:p>
          </table:table-cell>
          <table:table-cell table:style-name="ce8" office:value-type="string" calcext:value-type="string">
            <text:p>anteprima_stampa</text:p>
          </table:table-cell>
          <table:table-cell table:style-name="ce7" office:value-type="string" calcext:value-type="string">
            <text:p>Un profilo di stampante piatta elegante e moderno con carta in uscita</text:p>
          </table:table-cell>
          <table:table-cell table:style-name="ce7" office:value-type="string" calcext:value-type="string">
            <text:p>service:org.giuseppe-vizziello.leeno.dispatcher?pyleeno.MENU_sistema_pagin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sproteggi_sheet_TUTT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Sproteggi Tutto il file <text:s text:c="4"/>Ctl Shift K</text:p>
          </table:table-cell>
          <table:table-cell table:style-name="ce7" office:value-type="string" calcext:value-type="string">
            <text:p>Sprotegge e riordina tutti fogli del documento.</text:p>
          </table:table-cell>
          <table:table-cell table:style-name="ce8" office:value-type="string" calcext:value-type="string">
            <text:p>image17</text:p>
          </table:table-cell>
          <table:table-cell table:style-name="ce8" office:value-type="string" calcext:value-type="string">
            <text:p>sproteggi_tutto</text:p>
          </table:table-cell>
          <table:table-cell table:style-name="ce7" office:value-type="string" calcext:value-type="string">
            <text:p>Un contorno di lucchetto aperto in Giallo Avviso con un tratto da 2px</text:p>
          </table:table-cell>
          <table:table-cell table:style-name="ce7" office:value-type="string" calcext:value-type="string">
            <text:p>service:org.giuseppe-vizziello.leeno.dispatcher?pyleeno.MENU_sproteggi_sheet_TUTT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struttura_off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limina Strutture</text:p>
          </table:table-cell>
          <table:table-cell table:style-name="ce7" office:value-type="string" calcext:value-type="string">
            <text:p>Cancella la vista in struttura</text:p>
          </table:table-cell>
          <table:table-cell table:style-name="ce8" office:value-type="string" calcext:value-type="string">
            <text:p>image9</text:p>
          </table:table-cell>
          <table:table-cell table:style-name="ce8" office:value-type="string" calcext:value-type="string">
            <text:p>struttura_off</text:p>
          </table:table-cell>
          <table:table-cell table:style-name="ce7" office:value-type="string" calcext:value-type="string">
            <text:p>Un elenco strutturato con un indicatore di riduzione o una linea diagonale</text:p>
          </table:table-cell>
          <table:table-cell table:style-name="ce7" office:value-type="string" calcext:value-type="string">
            <text:p>service:org.giuseppe-vizziello.leeno.dispatcher?pyleeno.MENU_struttura_off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struttura_on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Metti in struttura</text:p>
          </table:table-cell>
          <table:table-cell table:style-name="ce7" office:value-type="string" calcext:value-type="string">
            <text:p>Attiva la visualizzazione a struttura in base al foglio attivo.</text:p>
          </table:table-cell>
          <table:table-cell table:style-name="ce8" office:value-type="string" calcext:value-type="string">
            <text:p>image8</text:p>
          </table:table-cell>
          <table:table-cell table:style-name="ce8" office:value-type="string" calcext:value-type="string">
            <text:p>struttura_on</text:p>
          </table:table-cell>
          <table:table-cell table:style-name="ce7" office:value-type="string" calcext:value-type="string">
            <text:p>Un elenco strutturato con un indicatore di espansione (`+` o rientro gerarchico)</text:p>
          </table:table-cell>
          <table:table-cell table:style-name="ce7" office:value-type="string" calcext:value-type="string">
            <text:p>service:org.giuseppe-vizziello.leeno.dispatcher?pyleeno.MENU_struttura_on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vedi_vo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Vedi voce precedente</text:p>
          </table:table-cell>
          <table:table-cell table:style-name="ce7" office:value-type="string" calcext:value-type="string">
            <text:p>Inserisce un riferimento a voce precedente sulla riga corrente.</text:p>
          </table:table-cell>
          <table:table-cell table:number-columns-repeated="2" table:style-name="ce8" office:value-type="string" calcext:value-type="string">
            <text:p>vedivoce</text:p>
          </table:table-cell>
          <table:table-cell table:style-name="ce7" office:value-type="string" calcext:value-type="string">
            <text:p>Un occhio aperto che guarda una primitiva documento</text:p>
          </table:table-cell>
          <table:table-cell table:style-name="ce7" office:value-type="string" calcext:value-type="string">
            <text:p>service:org.giuseppe-vizziello.leeno.dispatcher?pyleeno.MENU_vedi_voce</text:p>
          </table:table-cell>
          <table:table-cell table:style-name="ce3" table:number-columns-repeated="16376"/>
        </table:table-row>
        <table:table-row table:style-name="ro3">
          <table:table-cell table:style-name="ce2" office:value-type="string" calcext:value-type="string">
            <text:p>pyleeno.MENU_voce_brev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Descrizione abbreviata ON/OFF</text:p>
          </table:table-cell>
          <table:table-cell table:style-name="ce7" office:value-type="string" calcext:value-type="string">
            <text:p>Funzione per la gestione delle operazioni di voce breve nell'interfaccia di LeenO.</text:p>
          </table:table-cell>
          <table:table-cell table:style-name="ce8" office:value-type="string" calcext:value-type="string">
            <text:p>Corta</text:p>
          </table:table-cell>
          <table:table-cell table:style-name="ce8" office:value-type="string" calcext:value-type="string">
            <text:p>voce_breve</text:p>
          </table:table-cell>
          <table:table-cell table:style-name="ce7" office:value-type="string" calcext:value-type="string">
            <text:p>Icona piatta di forbici combinata con una linea tratteggiata orizzontale</text:p>
          </table:table-cell>
          <table:table-cell table:style-name="ce7" office:value-type="string" calcext:value-type="string">
            <text:p>service:org.giuseppe-vizziello.leeno.dispatcher?pyleeno.MENU_voce_brev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Menu_adattaAltezzaRiga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Adatta altezza righe</text:p>
          </table:table-cell>
          <table:table-cell table:style-name="ce7" office:value-type="string" calcext:value-type="string">
            <text:p>Adatta automaticamente l'altezza di tutte le righe selezionate in base alla lunghezza del testo contenuto per una corretta leggibilità.</text:p>
          </table:table-cell>
          <table:table-cell table:number-columns-repeated="2" table:style-name="ce8" office:value-type="string" calcext:value-type="string">
            <text:p>adattaH</text:p>
          </table:table-cell>
          <table:table-cell table:style-name="ce7" office:value-type="string" calcext:value-type="string">
            <text:p>Linea orizzontale pulita delimitata da frecce esterne su/giù</text:p>
          </table:table-cell>
          <table:table-cell table:style-name="ce7" office:value-type="string" calcext:value-type="string">
            <text:p>service:org.giuseppe-vizziello.leeno.dispatcher?pyleeno.Menu_adattaAltezzaRig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copia_sheet_consolida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Copia e consolida Foglio corrente</text:p>
          </table:table-cell>
          <table:table-cell table:style-name="ce7" office:value-type="string" calcext:value-type="string">
            <text:p>Copia il foglio corrente e ne consolida il contenu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pia_sheet_consolida</text:p>
          </table:table-cell>
          <table:table-cell table:style-name="ce7" office:value-type="string" calcext:value-type="string">
            <text:p>Icona outline coordinata per la funzione copia e consolida foglio corrente. Progettata su griglia 24x24 con spessore di 1.5px.</text:p>
          </table:table-cell>
          <table:table-cell table:style-name="ce7" office:value-type="string" calcext:value-type="string">
            <text:p>service:org.giuseppe-vizziello.leeno.dispatcher?pyleeno.copia_sheet_consolid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dlg_donazioni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LeenO ❤</text:p>
          </table:table-cell>
          <table:table-cell table:style-name="ce7" office:value-type="string" calcext:value-type="string">
            <text:p>Apre la pagina o il dialogo di supporto per effettuare donazioni volontarie a favore del progetto open-source LeenO.</text:p>
          </table:table-cell>
          <table:table-cell table:number-columns-repeated="2" table:style-name="ce8" office:value-type="string" calcext:value-type="string">
            <text:p>leeno</text:p>
          </table:table-cell>
          <table:table-cell table:style-name="ce7" office:value-type="string" calcext:value-type="string">
            <text:p>Marchio piatto e coeso. Lettere 'L' e 'O' intrecciate in stile outline vettoriale.</text:p>
          </table:table-cell>
          <table:table-cell table:style-name="ce7" office:value-type="string" calcext:value-type="string">
            <text:p>service:org.giuseppe-vizziello.leeno.dispatcher?pyleeno.dlg_donazioni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gantt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Esporta dati in formato CSV per GanttProject</text:p>
          </table:table-cell>
          <table:table-cell table:style-name="ce7" office:value-type="string" calcext:value-type="string">
            <text:p>Esporta i dati e la programmazione temporale dei lavori in formato CSV compatibile con GanttProject.</text:p>
          </table:table-cell>
          <table:table-cell table:number-columns-repeated="2" table:style-name="ce8" office:value-type="string" calcext:value-type="string">
            <text:p>esporta_gantt</text:p>
          </table:table-cell>
          <table:table-cell table:style-name="ce7" office:value-type="string" calcext:value-type="string">
            <text:p>Un profilo di un piccolo diagramma di Gantt (barre di attività orizzontali sfalsate) con una freccia di esportazione rivolta a destra (`→`).</text:p>
          </table:table-cell>
          <table:table-cell table:style-name="ce7" office:value-type="string" calcext:value-type="string">
            <text:p>service:org.giuseppe-vizziello.leeno.dispatcher?pyleeno.gantt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scelta_vist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VISTE</text:p>
          </table:table-cell>
          <table:table-cell table:style-name="ce7" office:value-type="string" calcext:value-type="string">
            <text:p>Consente di cambiare la modalità di visualizzazione corrente tra le varie viste disponibili (es. Computo, Stampa, Vista Mista).</text:p>
          </table:table-cell>
          <table:table-cell table:style-name="ce8" office:value-type="string" calcext:value-type="string">
            <text:p>image18</text:p>
          </table:table-cell>
          <table:table-cell table:style-name="ce8" office:value-type="string" calcext:value-type="string">
            <text:p>scelta_viste</text:p>
          </table:table-cell>
          <table:table-cell table:style-name="ce7" office:value-type="string" calcext:value-type="string">
            <text:p>Uno schermo di monitor diviso verticalmente in diversi layout di visualizzazione</text:p>
          </table:table-cell>
          <table:table-cell table:style-name="ce7" office:value-type="string" calcext:value-type="string">
            <text:p>service:org.giuseppe-vizziello.leeno.dispatcher?pyleeno.scelta_vist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somma_per_colore_nella_colonna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Somma per Colore</text:p>
          </table:table-cell>
          <table:table-cell table:style-name="ce7" office:value-type="string" calcext:value-type="string">
            <text:p>Somma i valori numerici presenti in una colonna filtrandoli in base al colore di sfondo impostato sulle celle.</text:p>
          </table:table-cell>
          <table:table-cell table:number-columns-repeated="2" table:style-name="ce8" office:value-type="string" calcext:value-type="string">
            <text:p>somma_colore</text:p>
          </table:table-cell>
          <table:table-cell table:style-name="ce7" office:value-type="string" calcext:value-type="string">
            <text:p>Un segno di sigma (`∑`) adiacente al profilo di un evidenziatore colorato.</text:p>
          </table:table-cell>
          <table:table-cell table:style-name="ce7" office:value-type="string" calcext:value-type="string">
            <text:p>service:org.giuseppe-vizziello.leeno.dispatcher?pyleeno.somma_per_colore_nella_colonna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sposta_voce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Sposta una Voce di Analisi, Computo o Contabilità</text:p>
          </table:table-cell>
          <table:table-cell table:style-name="ce7" office:value-type="string" calcext:value-type="string">
            <text:p>Consente di spostare in alto o in basso una voce di computo, analisi o contabilità comprensiva dei suoi righi di misura.</text:p>
          </table:table-cell>
          <table:table-cell table:style-name="ce8" office:value-type="string" calcext:value-type="string">
            <text:p>image37</text:p>
          </table:table-cell>
          <table:table-cell table:style-name="ce8" office:value-type="string" calcext:value-type="string">
            <text:p>sposta_voce</text:p>
          </table:table-cell>
          <table:table-cell table:style-name="ce7" office:value-type="string" calcext:value-type="string">
            <text:p>Due frecce verticali pulite che puntano in alto e in basso in parallelo</text:p>
          </table:table-cell>
          <table:table-cell table:style-name="ce7" office:value-type="string" calcext:value-type="string">
            <text:p>service:org.giuseppe-vizziello.leeno.dispatcher?pyleeno.sposta_voce</text:p>
          </table:table-cell>
          <table:table-cell table:style-name="ce3" table:number-columns-repeated="16376"/>
        </table:table-row>
        <table:table-row table:style-name="ro2">
          <table:table-cell table:style-name="ce2" office:value-type="string" calcext:value-type="string">
            <text:p>pyleeno.xref_path()</text:p>
          </table:table-cell>
          <table:table-cell table:style-name="ce5" office:value-type="string" calcext:value-type="string">
            <text:p>pyleeno</text:p>
          </table:table-cell>
          <table:table-cell table:style-name="ce7" office:value-type="string" calcext:value-type="string">
            <text:p>Inserisci Riferimento Esterno...</text:p>
          </table:table-cell>
          <table:table-cell table:style-name="ce7" office:value-type="string" calcext:value-type="string">
            <text:p>Inserisce un hyperlink all'indirizzo di file selezionato; il testo sarà "►►►"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ref_path</text:p>
          </table:table-cell>
          <table:table-cell table:style-name="ce7" office:value-type="string" calcext:value-type="string">
            <text:p>Icona outline coordinata per la funzione inserisci riferimento esterno.... Progettata su griglia 24x24 con spessore di 1.5px.</text:p>
          </table:table-cell>
          <table:table-cell table:style-name="ce7" office:value-type="string" calcext:value-type="string">
            <text:p>service:org.giuseppe-vizziello.leeno.dispatcher?pyleeno.xref_path</text:p>
          </table:table-cell>
          <table:table-cell table:style-name="ce3" table:number-columns-repeated="16376"/>
        </table:table-row>
        <table:table-row table:style-name="ro5" table:number-rows-repeated="1048488">
          <table:table-cell table:number-columns-repeated="8"/>
          <table:table-cell table:style-name="ce3" table:number-columns-repeated="16376"/>
        </table:table-row>
        <table:table-row table:style-name="ro5">
          <table:table-cell table:number-columns-repeated="8"/>
          <table:table-cell table:style-name="ce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Style" style:family="table-cell" style:parent-style-name="Default">
      <style:table-cell-properties fo:background-color="#5d7400" fo:border="0.06pt solid #d3d3d3"/>
      <style:text-properties fo:color="#ffffff" style:font-name="Segoe UI" fo:font-family="'Segoe UI'" fo:font-size="11pt" fo:font-weight="bold"/>
    </style:style>
    <style:style style:name="CellStyle" style:family="table-cell" style:parent-style-name="Default">
      <style:table-cell-properties fo:border="0.06pt solid #d3d3d3"/>
      <style:text-properties fo:color="#1a2010" style:font-name="Segoe UI" fo:font-family="'Segoe UI'" fo:font-size="10pt"/>
    </style:style>
    <style:style style:name="CodeStyle" style:family="table-cell" style:parent-style-name="Default">
      <style:table-cell-properties fo:border="0.06pt solid #d3d3d3"/>
      <style:text-properties fo:color="#1a2010" style:font-name="Consolas" fo:font-family="Consolas" fo:font-size="10pt" fo:font-weight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7-19T13:02:57.423926900</dc:date>
    <meta:editing-duration>PT6M20S</meta:editing-duration>
    <meta:editing-cycles>1</meta:editing-cycles>
    <meta:document-statistic meta:table-count="1" meta:cell-count="696" meta:object-count="0"/>
  </office:meta>
</office:document-meta>
</file>